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4000000B4AC5D68CA7E81D2C6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72bf44" draw:textarea-horizontal-align="justify" draw:textarea-vertical-align="middle" draw:auto-grow-height="false" fo:min-height="0.75cm" fo:min-width="1.3cm"/>
    </style:style>
    <style:style style:name="gr6" style:family="graphic" style:parent-style-name="standard">
      <style:graphic-properties draw:fill-color="#bee3d3" draw:textarea-horizontal-align="justify" draw:textarea-vertical-align="middle" draw:auto-grow-height="false" fo:min-height="0.75cm" fo:min-width="1.3cm"/>
    </style:style>
    <style:style style:name="gr7" style:family="graphic" style:parent-style-name="standard">
      <style:graphic-properties draw:fill-color="#fff200" draw:textarea-horizontal-align="justify" draw:textarea-vertical-align="middle" draw:auto-grow-height="false" fo:min-height="0.75cm" fo:min-width="1.3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subtitle">
      <style:graphic-properties draw:fill-color="#ffffff" fo:min-height="11.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-color="#72bf44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bee3d3"/>
      <style:paragraph-properties fo:text-align="center"/>
    </style:style>
    <style:style style:name="P11" style:family="paragraph">
      <loext:graphic-properties draw:fill-color="#bee3d3"/>
      <style:paragraph-properties fo:text-align="center"/>
      <style:text-properties fo:font-size="18pt"/>
    </style:style>
    <style:style style:name="P12" style:family="paragraph">
      <loext:graphic-properties draw:fill-color="#fff200"/>
      <style:paragraph-properties fo:text-align="center"/>
      <style:text-properties fo:font-size="18pt"/>
    </style:style>
    <style:style style:name="P13" style:family="paragraph">
      <loext:graphic-properties draw:fill-color="#fff200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2" draw:text-style-name="P4" draw:layer="layout" svg:width="1.8cm" svg:height="1cm" svg:x="1.4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1cm" svg:x="3.2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1cm" svg:x="5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1cm" svg:x="6.8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1cm" svg:x="8.6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1cm" svg:x="10.4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1cm" svg:x="12.2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7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5" draw:text-style-name="P8" draw:layer="layout" svg:width="1.8cm" svg:height="1cm" svg:x="1.4cm" svg:y="4.6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3.2cm" svg:y="4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5cm" svg:y="4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6.8cm" svg:y="4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8.6cm" svg:y="4.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10.4cm" svg:y="4.6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12.2cm" svg:y="4.6cm">
          <text:p text:style-name="P3">6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3.8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7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5" draw:text-style-name="P8" draw:layer="layout" svg:width="1.8cm" svg:height="1cm" svg:x="1.4cm" svg:y="4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3.2cm" svg:y="4.6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5cm" svg:y="4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6.8cm" svg:y="4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8.6cm" svg:y="4.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10.4cm" svg:y="4.6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12.2cm" svg:y="4.6cm">
          <text:p text:style-name="P3">6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3.8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7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0" draw:layer="layout" svg:width="1.8cm" svg:height="1cm" svg:x="1.4cm" svg:y="4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3.2cm" svg:y="4.6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5cm" svg:y="4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6.8cm" svg:y="4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8.6cm" svg:y="4.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10.4cm" svg:y="4.6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12.2cm" svg:y="4.6cm">
          <text:p text:style-name="P3">6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3.8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7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0" draw:layer="layout" svg:width="1.8cm" svg:height="1cm" svg:x="1.4cm" svg:y="4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3.2cm" svg:y="4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5cm" svg:y="4.6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6.8cm" svg:y="4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8.6cm" svg:y="4.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10.4cm" svg:y="4.6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12.2cm" svg:y="4.6cm">
          <text:p text:style-name="P3">6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3.8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7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0" draw:layer="layout" svg:width="1.8cm" svg:height="1cm" svg:x="1.4cm" svg:y="4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4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5cm" svg:y="4.6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6.8cm" svg:y="4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8.6cm" svg:y="4.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10.4cm" svg:y="4.6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12.2cm" svg:y="4.6cm">
          <text:p text:style-name="P3">6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3.8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7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0" draw:layer="layout" svg:width="1.8cm" svg:height="1cm" svg:x="1.4cm" svg:y="4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4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5cm" svg:y="4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6.8cm" svg:y="4.6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8.6cm" svg:y="4.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10.4cm" svg:y="4.6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12.2cm" svg:y="4.6cm">
          <text:p text:style-name="P3">6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3.8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7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0" draw:layer="layout" svg:width="1.8cm" svg:height="1cm" svg:x="1.4cm" svg:y="4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4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4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6.8cm" svg:y="4.6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8.6cm" svg:y="4.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10.4cm" svg:y="4.6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12.2cm" svg:y="4.6cm">
          <text:p text:style-name="P3">6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3.8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7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0" draw:layer="layout" svg:width="1.8cm" svg:height="1cm" svg:x="1.4cm" svg:y="4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4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4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6.8cm" svg:y="4.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8.6cm" svg:y="4.6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10.4cm" svg:y="4.6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12.2cm" svg:y="4.6cm">
          <text:p text:style-name="P3">6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3.8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7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0" draw:layer="layout" svg:width="1.8cm" svg:height="1cm" svg:x="1.4cm" svg:y="4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4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4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4.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8.6cm" svg:y="4.6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10.4cm" svg:y="4.6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12.2cm" svg:y="4.6cm">
          <text:p text:style-name="P3">6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3.8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7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0" draw:layer="layout" svg:width="1.8cm" svg:height="1cm" svg:x="1.4cm" svg:y="4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4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4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4.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8.6cm" svg:y="4.6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10.4cm" svg:y="4.6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12.2cm" svg:y="4.6cm">
          <text:p text:style-name="P3">6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3.8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7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0" draw:layer="layout" svg:width="1.8cm" svg:height="1cm" svg:x="1.4cm" svg:y="4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4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4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4.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4.6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10.4cm" svg:y="4.6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12.2cm" svg:y="4.6cm">
          <text:p text:style-name="P3">6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3.8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7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0" draw:layer="layout" svg:width="1.8cm" svg:height="1cm" svg:x="1.4cm" svg:y="4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4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4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4.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4.6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10.4cm" svg:y="4.6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12.2cm" svg:y="4.6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3.8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5" draw:text-style-name="P8" draw:layer="layout" svg:width="1.8cm" svg:height="1cm" svg:x="1.4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3.2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5" draw:text-style-name="P8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3.2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3.2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5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5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5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6.8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6.8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6.8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8.6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5" draw:text-style-name="P8" draw:layer="layout" svg:width="1.8cm" svg:height="1cm" svg:x="1.4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3.2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5" draw:text-style-name="P8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3.2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3.2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5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5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5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6.8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5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6.8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6.8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11.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11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11.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11.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1.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1.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1.8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1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5" draw:text-style-name="P8" draw:layer="layout" svg:width="1.8cm" svg:height="1cm" svg:x="1.4cm" svg:y="11.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3.2cm" svg:y="11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11.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11.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1.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1.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1.8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1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11.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3.2cm" svg:y="11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5cm" svg:y="11.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11.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1.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1.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1.8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1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11.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3.2cm" svg:y="11.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5cm" svg:y="11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11.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1.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1.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1.8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1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11.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11.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5cm" svg:y="11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6.8cm" svg:y="11.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1.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1.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1.8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1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8"/>1 <text:s text:c="7"/>2 <text:s text:c="7"/>3 <text:s text:c="7"/>4 <text:s text:c="7"/>5 <text:s text:c="7"/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8"/>1 <text:s text:c="7"/>2 <text:s text:c="7"/>3 <text:s text:c="7"/>4 <text:s text:c="7"/>5 <text:s text:c="7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8"/>1 <text:s text:c="7"/>2 <text:s text:c="7"/>3 <text:s text:c="7"/>4 <text:s text:c="7"/>5 <text:s text:c="7"/>6</text:p>
          </draw:text-box>
        </draw:frame>
        <draw:custom-shape draw:style-name="gr6" draw:text-style-name="P10" draw:layer="layout" svg:width="1.8cm" svg:height="1cm" svg:x="1.4cm" svg:y="11.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11.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11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6.8cm" svg:y="11.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1.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1.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1.8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1cm">
          <draw:text-box>
            <text:p>0 <text:s text:c="8"/>1 <text:s text:c="7"/>2 <text:s text:c="7"/>3 <text:s text:c="7"/>4 <text:s text:c="7"/>5 <text:s text:c="7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4" draw:text-style-name="P1" draw:layer="layout" svg:width="25.2cm" svg:height="11.8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11.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11.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11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6.8cm" svg:y="11.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1.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1.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1.8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1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5" draw:text-style-name="P8" draw:layer="layout" svg:width="1.8cm" svg:height="1cm" svg:x="1.4cm" svg:y="14.2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3.2cm" svg:y="14.2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14.2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6.8cm" svg:y="14.2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4.2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4.2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4.2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3.4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4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4" draw:text-style-name="P1" draw:layer="layout" svg:width="25.2cm" svg:height="11.8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11.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11.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11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6.8cm" svg:y="11.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1.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1.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1.8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1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14.2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3.2cm" svg:y="14.2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5cm" svg:y="14.2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6.8cm" svg:y="14.2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4.2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4.2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4.2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3.4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4" draw:text-style-name="P1" draw:layer="layout" svg:width="25.2cm" svg:height="11.8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11.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11.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11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6.8cm" svg:y="11.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1.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1.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1.8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1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14.2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14.2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5cm" svg:y="14.2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6.8cm" svg:y="14.2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4.2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4.2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4.2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3.4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4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4" draw:text-style-name="P1" draw:layer="layout" svg:width="26.8cm" svg:height="11.8cm" svg:x="0.2cm" svg:y="3.4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11.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11.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11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6.8cm" svg:y="11.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1.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1.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1.8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1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14.2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14.2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5cm" svg:y="14.2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6.8cm" svg:y="14.2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4.2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4.2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4.2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3.4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4.2cm" svg:y="4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16cm" svg:y="4.6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7.8cm" svg:y="4.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9.6cm" svg:y="4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21.4cm" svg:y="4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23.2cm" svg:y="4.6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25cm" svg:y="4.6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4.6cm" svg:y="3.8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4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4" draw:text-style-name="P1" draw:layer="layout" svg:width="26.8cm" svg:height="11.8cm" svg:x="0.2cm" svg:y="3.4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11.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11.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11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6.8cm" svg:y="11.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1.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1.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1.8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1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14.2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14.2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5cm" svg:y="14.2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6.8cm" svg:y="14.2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4.2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4.2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4.2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3.4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5" draw:text-style-name="P8" draw:layer="layout" svg:width="1.8cm" svg:height="1cm" svg:x="14.2cm" svg:y="4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8cm" svg:height="1cm" svg:x="16cm" svg:y="4.6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7.8cm" svg:y="4.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9.6cm" svg:y="4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21.4cm" svg:y="4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23.2cm" svg:y="4.6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25cm" svg:y="4.6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4.6cm" svg:y="3.8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4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4" draw:text-style-name="P1" draw:layer="layout" svg:width="26.8cm" svg:height="11.8cm" svg:x="0.2cm" svg:y="3.4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11.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11.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11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6.8cm" svg:y="11.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1.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1.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1.8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1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14.2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14.2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5cm" svg:y="14.2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6.8cm" svg:y="14.2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4.2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4.2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4.2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3.4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4.2cm" svg:y="4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6cm" svg:y="4.6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7.8cm" svg:y="4.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9.6cm" svg:y="4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21.4cm" svg:y="4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23.2cm" svg:y="4.6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25cm" svg:y="4.6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4.6cm" svg:y="3.8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4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Bubble sort</text:p>
          </draw:text-box>
        </draw:frame>
        <draw:frame presentation:style-name="pr4" draw:text-style-name="P1" draw:layer="layout" svg:width="26.8cm" svg:height="11.8cm" svg:x="0.2cm" svg:y="3.4cm" presentation:class="subtitle" presentation:placeholder="true" presentation:user-transformed="true">
          <draw:text-box/>
        </draw:frame>
        <draw:frame draw:style-name="gr1" draw:text-style-name="P2" draw:layer="layout" svg:width="3.2cm" svg:height="2.962cm" svg:x="23.4cm" svg:y="0.438cm">
          <draw:image xlink:href="Pictures/10000201000000B4000000B4AC5D68CA7E81D2C6.png" xlink:type="simple" xlink:show="embed" xlink:actuate="onLoad">
            <text:p/>
          </draw:image>
        </draw:frame>
        <draw:custom-shape draw:style-name="gr6" draw:text-style-name="P11" draw:layer="layout" svg:width="1.8cm" svg:height="1cm" svg:x="1.4cm" svg:y="4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3.2cm" svg:y="4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5cm" svg:y="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6.8cm" svg:y="4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8.6cm" svg:y="4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1cm" svg:x="10.4cm" svg:y="4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cm" svg:x="12.2cm" svg:y="4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8cm" svg:height="0.962cm" svg:x="1.8cm" svg:y="3.8cm">
          <draw:text-box>
            <text:p><text:span text:style-name="T1">0 <text:s text:c="5"/></text:span><text:span text:style-name="T1"><text:s text:c="3"/>1 <text:s text:c="2"/></text:span><text:span text:style-name="T1"><text:s text:c="5"/>2 </text:span><text:span text:style-name="T1"><text:s text:c="7"/></text:span><text:span text:style-name="T1">3 <text:s text:c="5"/></text:span><text:span text:style-name="T1"><text:s text:c="2"/>4 <text:s text:c="3"/></text:span><text:span text:style-name="T1"><text:s text:c="4"/>5 <text:s/></text:span><text:span text:style-name="T1"><text:s text:c="6"/></text:span><text:span text:style-name="T1">6</text:span></text:p>
          </draw:text-box>
        </draw:frame>
        <draw:custom-shape draw:style-name="gr6" draw:text-style-name="P10" draw:layer="layout" svg:width="1.8cm" svg:height="1cm" svg:x="1.4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8.6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9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9.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9.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6.8cm" svg:y="9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9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9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9.4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8.6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11.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11.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5cm" svg:y="11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6.8cm" svg:y="11.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1.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1.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1.8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1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.4cm" svg:y="14.2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cm" svg:height="1cm" svg:x="3.2cm" svg:y="14.2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5cm" svg:y="14.2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6.8cm" svg:y="14.2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8.6cm" svg:y="14.2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0.4cm" svg:y="14.2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2.2cm" svg:y="14.2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.8cm" svg:y="13.4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6" draw:text-style-name="P10" draw:layer="layout" svg:width="1.8cm" svg:height="1cm" svg:x="14.2cm" svg:y="4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6cm" svg:y="4.6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7.8cm" svg:y="4.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9.6cm" svg:y="4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21.4cm" svg:y="4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23.2cm" svg:y="4.6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25cm" svg:y="4.6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4.6cm" svg:y="3.8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draw:custom-shape draw:style-name="gr7" draw:text-style-name="P13" draw:layer="layout" svg:width="1.8cm" svg:height="1cm" svg:x="14.2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6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7.8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19.6cm" svg:y="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21.4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23.2cm" svg:y="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8cm" svg:height="1cm" svg:x="25cm" svg:y="7cm">
          <text:p text:style-name="P3">10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1.8cm" svg:height="0.962cm" svg:x="14.6cm" svg:y="6.2cm">
          <draw:text-box>
            <text:p>0 <text:s text:c="5"/><text:s text:c="3"/>1 <text:s text:c="2"/><text:s text:c="5"/>2 <text:s text:c="7"/>3 <text:s text:c="5"/><text:s text:c="2"/>4 <text:s text:c="3"/><text:s text:c="4"/>5 <text:s/><text:s text:c="6"/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48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2:04:57.445546803</meta:creation-date>
    <meta:editing-duration>PT2H33M43S</meta:editing-duration>
    <meta:editing-cycles>32</meta:editing-cycles>
    <meta:generator>LibreOffice/6.0.7.3$Linux_X86_64 LibreOffice_project/00m0$Build-3</meta:generator>
    <dc:title>Bright Blue</dc:title>
    <dc:date>2020-03-02T19:03:51.147961865</dc:date>
    <meta:document-statistic meta:object-count="1302"/>
  </office:meta>
</office:document-meta>
</file>