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1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6" style:family="graphic" style:parent-style-name="standard">
      <style:graphic-properties svg:stroke-color="#000000" draw:fill-color="#fff685" draw:textarea-horizontal-align="justify" draw:textarea-vertical-align="middle" draw:auto-grow-height="false" fo:min-height="2.35cm" fo:min-width="1.3cm"/>
    </style:style>
    <style:style style:name="gr7" style:family="graphic" style:parent-style-name="standard">
      <style:graphic-properties svg:stroke-color="#000000" draw:fill-color="#add58a" draw:textarea-horizontal-align="justify" draw:textarea-vertical-align="middle" draw:auto-grow-height="false" fo:min-height="2.35cm" fo:min-width="1.3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2.35cm" fo:min-width="1.3cm"/>
    </style:style>
    <style:style style:name="gr12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2.35cm" fo:min-width="1.3cm"/>
    </style:style>
    <style:style style:name="gr13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2.35cm" fo:min-width="1.3cm"/>
    </style:style>
    <style:style style:name="gr14" style:family="graphic" style:parent-style-name="standard">
      <style:graphic-properties svg:stroke-color="#000000" draw:fill="solid" draw:fill-color="#ff3366" draw:textarea-horizontal-align="justify" draw:textarea-vertical-align="middle" draw:auto-grow-height="false" fo:min-height="2.35cm" fo:min-width="1.3cm"/>
    </style:style>
    <style:style style:name="gr15" style:family="graphic" style:parent-style-name="standard">
      <style:graphic-properties svg:stroke-color="#000000" draw:fill="solid" draw:fill-color="#996633" draw:textarea-horizontal-align="justify" draw:textarea-vertical-align="middle" draw:auto-grow-height="false" fo:min-height="2.35cm" fo:min-width="1.3cm"/>
    </style:style>
    <style:style style:name="gr16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2.35cm" fo:min-width="1.3cm"/>
    </style:style>
    <style:style style:name="pr1" style:family="presentation" style:parent-style-name="Impress1-title">
      <style:graphic-properties svg:stroke-color="#ed1c24" draw:fill-color="#a3238e"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1" style:family="paragraph">
      <loext:graphic-properties draw:fill-color="#a3238e"/>
      <style:text-properties fo:color="#a3238e" style:font-name="Liberation Serif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685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-color="#add58a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83caff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="solid" draw:fill-color="#00ff00"/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loext:graphic-properties draw:fill="solid" draw:fill-color="#ff950e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loext:graphic-properties draw:fill="solid" draw:fill-color="#ff3366"/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loext:graphic-properties draw:fill="solid" draw:fill-color="#996633"/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d32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a3238e" style:font-name="Liberation Serif"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per 58%"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3238e" style:font-name="Liberation Serif" fo:font-size="24pt" style:font-size-asian="44pt" style:font-size-complex="44pt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3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1" draw:text-style-name="P3" draw:layer="layout" svg:width="1.8cm" svg:height="1.4cm" svg:x="1.566cm" svg:y="7.4cm">
          <text:p text:style-name="P2">40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cm" svg:height="1.4cm" svg:x="3.366cm" svg:y="7.4cm">
          <text:p text:style-name="P2">50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cm" svg:height="1.4cm" svg:x="5.166cm" svg:y="7.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cm" svg:height="1.4cm" svg:x="6.966cm" svg:y="7.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cm" svg:height="1.4cm" svg:x="8.766cm" svg:y="7.4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cm" svg:height="1.4cm" svg:x="10.566cm" svg:y="7.4cm">
          <text:p text:style-name="P2">30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434cm" svg:height="0.962cm" svg:x="1.966cm" svg:y="6.4cm">
          <draw:text-box>
            <text:p><text:s/>0 <text:s text:c="4"/><text:s text:c="3"/>1 <text:s text:c="2"/><text:s text:c="6"/>2 <text:s text:c="5"/><text:s text:c="2"/>3 <text:s text:c="3"/><text:s text:c="4"/>4 <text:s/><text:s text:c="6"/>5 <text:s/></text:p>
          </draw:text-box>
        </draw:frame>
        <draw:frame presentation:style-name="pr2" draw:layer="layout" svg:width="11.711cm" svg:height="12.18cm" svg:x="2cm" svg:y="6cm" presentation:class="outline">
          <draw:text-box>
            <text:p><text:s text:c="4"/></text:p>
            <text:p><text:s text:c="11"/></text:p>
          </draw:text-box>
        </draw:frame>
        <draw:frame presentation:style-name="pr2" draw:text-style-name="P5" draw:layer="layout" svg:width="11.711cm" svg:height="12.18cm" svg:x="14.298cm" svg:y="6cm" presentation:class="outline">
          <draw:text-box>
            <text:list text:style-name="L2">
              <text:list-item>
                <text:p><text:span text:style-name="T2">Iterations : </text:span></text:p>
              </text:list-item>
              <text:list-item>
                <text:p><text:span text:style-name="T2">1</text:span><text:span text:style-name="T3">st</text:span><text:span text:style-name="T2"> : 0-1,0-2,0-3,0-4,0-5</text:span></text:p>
              </text:list-item>
              <text:list-item>
                <text:p><text:span text:style-name="T2">2</text:span><text:span text:style-name="T3">nd </text:span><text:span text:style-name="T2">: 1-2, 1-3, 1-4, 1-5</text:span></text:p>
              </text:list-item>
              <text:list-item>
                <text:p><text:span text:style-name="T2">3</text:span><text:span text:style-name="T3">rd </text:span><text:span text:style-name="T2">: <text:s/>2-3, 2-4, 2-5</text:span></text:p>
              </text:list-item>
              <text:list-item>
                <text:p><text:span text:style-name="T2">4</text:span><text:span text:style-name="T3">th </text:span><text:span text:style-name="T2">: <text:s/>3-4, 3-5</text:span></text:p>
              </text:list-item>
              <text:list-item>
                <text:p><text:span text:style-name="T2">5</text:span><text:span text:style-name="T3">th </text:span><text:span text:style-name="T2">: <text:s/>4-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4" draw:text-style-name="P7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195cm" svg:y="6.4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5.995cm" svg:y="6.438cm">
          <draw:text-box>
            <text:p><text:span text:style-name="T5">40</text:span></text:p>
          </draw:text-box>
        </draw:frame>
        <draw:line draw:style-name="gr8" draw:text-style-name="P13" draw:layer="layout" svg:x1="3.405cm" svg:y1="5.6cm" svg:x2="2.2cm" svg:y2="6.562cm">
          <text:p/>
        </draw:line>
        <draw:line draw:style-name="gr8" draw:text-style-name="P13" draw:layer="layout" svg:x1="7.2cm" svg:y1="5.6cm" svg:x2="5.995cm" svg:y2="6.56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9" draw:text-style-name="P9" draw:layer="layout" svg:width="1.205cm" svg:height="0.962cm" svg:x="2.195cm" svg:y="6.4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5.995cm" svg:y="6.438cm">
          <draw:text-box>
            <text:p><text:span text:style-name="T5">40</text:span></text:p>
          </draw:text-box>
        </draw:frame>
        <draw:line draw:style-name="gr8" draw:text-style-name="P13" draw:layer="layout" svg:x1="3.405cm" svg:y1="5.6cm" svg:x2="2.2cm" svg:y2="6.562cm">
          <text:p/>
        </draw:line>
        <draw:line draw:style-name="gr8" draw:text-style-name="P13" draw:layer="layout" svg:x1="7.2cm" svg:y1="5.6cm" svg:x2="5.995cm" svg:y2="6.56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9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9" draw:text-style-name="P9" draw:layer="layout" svg:width="1.205cm" svg:height="0.962cm" svg:x="2.195cm" svg:y="6.4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5.995cm" svg:y="6.438cm">
          <draw:text-box>
            <text:p><text:span text:style-name="T5">40</text:span></text:p>
          </draw:text-box>
        </draw:frame>
        <draw:line draw:style-name="gr8" draw:text-style-name="P13" draw:layer="layout" svg:x1="3.405cm" svg:y1="5.6cm" svg:x2="2.2cm" svg:y2="6.562cm">
          <text:p/>
        </draw:line>
        <draw:line draw:style-name="gr8" draw:text-style-name="P13" draw:layer="layout" svg:x1="7.2cm" svg:y1="5.6cm" svg:x2="5.995cm" svg:y2="6.562cm">
          <text:p/>
        </draw:line>
        <draw:frame draw:style-name="gr5" draw:text-style-name="P9" draw:layer="layout" svg:width="1.205cm" svg:height="0.962cm" svg:x="2.195cm" svg:y="7.2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31cm" svg:y="6.4cm">
          <draw:text-box>
            <text:p><text:span text:style-name="T5">20</text:span></text:p>
          </draw:text-box>
        </draw:frame>
        <draw:line draw:style-name="gr8" draw:text-style-name="P13" draw:layer="layout" svg:x1="3.4cm" svg:y1="6.4cm" svg:x2="2.201cm" svg:y2="7.4cm">
          <text:p/>
        </draw:line>
        <draw:line draw:style-name="gr8" draw:text-style-name="P13" draw:layer="layout" svg:x1="8.8cm" svg:y1="5.562cm" svg:x2="8cm" svg:y2="6.562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9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9" draw:text-style-name="P9" draw:layer="layout" svg:width="1.205cm" svg:height="0.962cm" svg:x="2.195cm" svg:y="6.4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5.995cm" svg:y="6.438cm">
          <draw:text-box>
            <text:p><text:span text:style-name="T5">40</text:span></text:p>
          </draw:text-box>
        </draw:frame>
        <draw:line draw:style-name="gr8" draw:text-style-name="P13" draw:layer="layout" svg:x1="3.405cm" svg:y1="5.6cm" svg:x2="2.2cm" svg:y2="6.562cm">
          <text:p/>
        </draw:line>
        <draw:line draw:style-name="gr8" draw:text-style-name="P13" draw:layer="layout" svg:x1="7.2cm" svg:y1="5.6cm" svg:x2="5.995cm" svg:y2="6.562cm">
          <text:p/>
        </draw:line>
        <draw:frame draw:style-name="gr5" draw:text-style-name="P9" draw:layer="layout" svg:width="1.205cm" svg:height="0.962cm" svg:x="2.195cm" svg:y="7.2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31cm" svg:y="6.4cm">
          <draw:text-box>
            <text:p><text:span text:style-name="T5">20</text:span></text:p>
          </draw:text-box>
        </draw:frame>
        <draw:line draw:style-name="gr8" draw:text-style-name="P13" draw:layer="layout" svg:x1="3.4cm" svg:y1="6.4cm" svg:x2="2.201cm" svg:y2="7.4cm">
          <text:p/>
        </draw:line>
        <draw:line draw:style-name="gr8" draw:text-style-name="P13" draw:layer="layout" svg:x1="8.8cm" svg:y1="5.562cm" svg:x2="8cm" svg:y2="6.562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.2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5.6cm">
          <draw:text-box>
            <text:p><text:span text:style-name="T5">20</text:span></text:p>
          </draw:text-box>
        </draw:frame>
        <draw:frame draw:style-name="gr9" draw:text-style-name="P9" draw:layer="layout" svg:width="1.205cm" svg:height="0.962cm" svg:x="7.731cm" svg:y="5.6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9" draw:text-style-name="P9" draw:layer="layout" svg:width="1.205cm" svg:height="0.962cm" svg:x="2.195cm" svg:y="6.4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5.995cm" svg:y="6.438cm">
          <draw:text-box>
            <text:p><text:span text:style-name="T5">40</text:span></text:p>
          </draw:text-box>
        </draw:frame>
        <draw:line draw:style-name="gr8" draw:text-style-name="P13" draw:layer="layout" svg:x1="3.405cm" svg:y1="5.6cm" svg:x2="2.2cm" svg:y2="6.562cm">
          <text:p/>
        </draw:line>
        <draw:line draw:style-name="gr8" draw:text-style-name="P13" draw:layer="layout" svg:x1="7.2cm" svg:y1="5.6cm" svg:x2="5.995cm" svg:y2="6.562cm">
          <text:p/>
        </draw:line>
        <draw:frame draw:style-name="gr5" draw:text-style-name="P9" draw:layer="layout" svg:width="1.205cm" svg:height="0.962cm" svg:x="2.195cm" svg:y="7.2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31cm" svg:y="6.4cm">
          <draw:text-box>
            <text:p><text:span text:style-name="T5">20</text:span></text:p>
          </draw:text-box>
        </draw:frame>
        <draw:line draw:style-name="gr8" draw:text-style-name="P13" draw:layer="layout" svg:x1="3.4cm" svg:y1="6.4cm" svg:x2="2.201cm" svg:y2="7.4cm">
          <text:p/>
        </draw:line>
        <draw:line draw:style-name="gr8" draw:text-style-name="P13" draw:layer="layout" svg:x1="8.8cm" svg:y1="5.562cm" svg:x2="8cm" svg:y2="6.562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draw:line draw:style-name="gr8" draw:text-style-name="P13" draw:layer="layout" svg:x1="5.2cm" svg:y1="9.8cm" svg:x2="4.4cm" svg:y2="10.762cm">
          <text:p/>
        </draw:line>
        <draw:line draw:style-name="gr8" draw:text-style-name="P13" draw:layer="layout" svg:x1="6.8cm" svg:y1="9.8cm" svg:x2="6.2cm" svg:y2="10.762cm">
          <text:p/>
        </draw:line>
        <draw:frame draw:style-name="gr5" draw:text-style-name="P9" draw:layer="layout" svg:width="1.205cm" svg:height="0.962cm" svg:x="5.872cm" svg:y="10.6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4.195cm" svg:y="10.6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draw:line draw:style-name="gr8" draw:text-style-name="P13" draw:layer="layout" svg:x1="5.2cm" svg:y1="9.8cm" svg:x2="4.4cm" svg:y2="10.762cm">
          <text:p/>
        </draw:line>
        <draw:line draw:style-name="gr8" draw:text-style-name="P13" draw:layer="layout" svg:x1="6.8cm" svg:y1="9.8cm" svg:x2="6.2cm" svg:y2="10.762cm">
          <text:p/>
        </draw:line>
        <draw:frame draw:style-name="gr5" draw:text-style-name="P9" draw:layer="layout" svg:width="1.205cm" svg:height="0.962cm" svg:x="5.872cm" svg:y="10.6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4.195cm" svg:y="10.6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draw:line draw:style-name="gr8" draw:text-style-name="P13" draw:layer="layout" svg:x1="5.2cm" svg:y1="9.8cm" svg:x2="4.4cm" svg:y2="10.762cm">
          <text:p/>
        </draw:line>
        <draw:line draw:style-name="gr8" draw:text-style-name="P13" draw:layer="layout" svg:x1="7.077cm" svg:y1="9.8cm" svg:x2="5.872cm" svg:y2="10.762cm">
          <text:p/>
        </draw:line>
        <draw:frame draw:style-name="gr5" draw:text-style-name="P9" draw:layer="layout" svg:width="1.205cm" svg:height="0.962cm" svg:x="5.872cm" svg:y="10.6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4.195cm" svg:y="10.638cm">
          <draw:text-box>
            <text:p><text:span text:style-name="T5">40</text:span></text:p>
          </draw:text-box>
        </draw:frame>
        <draw:line draw:style-name="gr8" draw:text-style-name="P13" draw:layer="layout" svg:x1="8.919cm" svg:y1="10cm" svg:x2="7.714cm" svg:y2="10.6cm">
          <text:p/>
        </draw:line>
        <draw:line draw:style-name="gr8" draw:text-style-name="P13" draw:layer="layout" svg:x1="5.4cm" svg:y1="10.638cm" svg:x2="4.195cm" svg:y2="11.6cm">
          <text:p/>
        </draw:line>
        <draw:frame draw:style-name="gr5" draw:text-style-name="P9" draw:layer="layout" svg:width="1.205cm" svg:height="0.962cm" svg:x="7.714cm" svg:y="10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1.4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draw:line draw:style-name="gr8" draw:text-style-name="P13" draw:layer="layout" svg:x1="5.2cm" svg:y1="9.8cm" svg:x2="4.4cm" svg:y2="10.762cm">
          <text:p/>
        </draw:line>
        <draw:line draw:style-name="gr8" draw:text-style-name="P13" draw:layer="layout" svg:x1="7.077cm" svg:y1="9.8cm" svg:x2="5.872cm" svg:y2="10.762cm">
          <text:p/>
        </draw:line>
        <draw:frame draw:style-name="gr5" draw:text-style-name="P9" draw:layer="layout" svg:width="1.205cm" svg:height="0.962cm" svg:x="5.872cm" svg:y="10.6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4.195cm" svg:y="10.638cm">
          <draw:text-box>
            <text:p><text:span text:style-name="T5">40</text:span></text:p>
          </draw:text-box>
        </draw:frame>
        <draw:line draw:style-name="gr8" draw:text-style-name="P13" draw:layer="layout" svg:x1="8.919cm" svg:y1="10cm" svg:x2="7.714cm" svg:y2="10.6cm">
          <text:p/>
        </draw:line>
        <draw:line draw:style-name="gr8" draw:text-style-name="P13" draw:layer="layout" svg:x1="5.4cm" svg:y1="10.638cm" svg:x2="4.195cm" svg:y2="11.6cm">
          <text:p/>
        </draw:line>
        <draw:frame draw:style-name="gr5" draw:text-style-name="P9" draw:layer="layout" svg:width="1.205cm" svg:height="0.962cm" svg:x="7.714cm" svg:y="10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1.4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34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72cm" svg:y="9.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714cm" svg:y="9.8cm">
          <draw:text-box>
            <text:p><text:span text:style-name="T5">20</text:span></text:p>
          </draw:text-box>
        </draw:frame>
        <draw:line draw:style-name="gr8" draw:text-style-name="P13" draw:layer="layout" svg:x1="5.2cm" svg:y1="9.8cm" svg:x2="4.4cm" svg:y2="10.762cm">
          <text:p/>
        </draw:line>
        <draw:line draw:style-name="gr8" draw:text-style-name="P13" draw:layer="layout" svg:x1="7.077cm" svg:y1="9.8cm" svg:x2="5.872cm" svg:y2="10.762cm">
          <text:p/>
        </draw:line>
        <draw:frame draw:style-name="gr5" draw:text-style-name="P9" draw:layer="layout" svg:width="1.205cm" svg:height="0.962cm" svg:x="5.872cm" svg:y="10.6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4.195cm" svg:y="10.638cm">
          <draw:text-box>
            <text:p><text:span text:style-name="T5">40</text:span></text:p>
          </draw:text-box>
        </draw:frame>
        <draw:line draw:style-name="gr8" draw:text-style-name="P13" draw:layer="layout" svg:x1="8.919cm" svg:y1="10cm" svg:x2="7.714cm" svg:y2="10.6cm">
          <text:p/>
        </draw:line>
        <draw:line draw:style-name="gr8" draw:text-style-name="P13" draw:layer="layout" svg:x1="5.4cm" svg:y1="10.638cm" svg:x2="4.195cm" svg:y2="11.6cm">
          <text:p/>
        </draw:line>
        <draw:frame draw:style-name="gr5" draw:text-style-name="P9" draw:layer="layout" svg:width="1.205cm" svg:height="0.962cm" svg:x="7.714cm" svg:y="10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1.4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line draw:style-name="gr8" draw:text-style-name="P13" draw:layer="layout" svg:x1="7cm" svg:y1="14cm" svg:x2="6.2cm" svg:y2="14.962cm">
          <text:p/>
        </draw:line>
        <draw:line draw:style-name="gr8" draw:text-style-name="P13" draw:layer="layout" svg:x1="8.8cm" svg:y1="14.038cm" svg:x2="7.714cm" svg:y2="15cm">
          <text:p/>
        </draw:line>
        <draw:frame draw:style-name="gr5" draw:text-style-name="P9" draw:layer="layout" svg:width="1.205cm" svg:height="0.962cm" svg:x="7.714cm" svg:y="14.8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line draw:style-name="gr8" draw:text-style-name="P13" draw:layer="layout" svg:x1="7cm" svg:y1="14cm" svg:x2="6.2cm" svg:y2="14.962cm">
          <text:p/>
        </draw:line>
        <draw:line draw:style-name="gr8" draw:text-style-name="P13" draw:layer="layout" svg:x1="8.8cm" svg:y1="14.038cm" svg:x2="7.714cm" svg:y2="15cm">
          <text:p/>
        </draw:line>
        <draw:frame draw:style-name="gr5" draw:text-style-name="P9" draw:layer="layout" svg:width="1.205cm" svg:height="0.962cm" svg:x="7.714cm" svg:y="14.8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line draw:style-name="gr8" draw:text-style-name="P13" draw:layer="layout" svg:x1="7cm" svg:y1="14cm" svg:x2="6.2cm" svg:y2="14.962cm">
          <text:p/>
        </draw:line>
        <draw:line draw:style-name="gr8" draw:text-style-name="P13" draw:layer="layout" svg:x1="8.8cm" svg:y1="14.038cm" svg:x2="7.714cm" svg:y2="15cm">
          <text:p/>
        </draw:line>
        <draw:frame draw:style-name="gr5" draw:text-style-name="P9" draw:layer="layout" svg:width="1.205cm" svg:height="0.962cm" svg:x="7.714cm" svg:y="14.8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line draw:style-name="gr8" draw:text-style-name="P13" draw:layer="layout" svg:x1="7cm" svg:y1="14cm" svg:x2="6.2cm" svg:y2="14.962cm">
          <text:p/>
        </draw:line>
        <draw:line draw:style-name="gr8" draw:text-style-name="P13" draw:layer="layout" svg:x1="8.8cm" svg:y1="14.038cm" svg:x2="7.714cm" svg:y2="15cm">
          <text:p/>
        </draw:line>
        <draw:frame draw:style-name="gr5" draw:text-style-name="P9" draw:layer="layout" svg:width="1.205cm" svg:height="0.962cm" svg:x="7.714cm" svg:y="14.8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38cm">
          <draw:text-box>
            <text:p><text:span text:style-name="T5">40</text:span></text:p>
          </draw:text-box>
        </draw:frame>
        <draw:line draw:style-name="gr8" draw:text-style-name="P13" draw:layer="layout" svg:x1="7.2cm" svg:y1="14.838cm" svg:x2="5.995cm" svg:y2="15.8cm">
          <text:p/>
        </draw:line>
        <draw:line draw:style-name="gr8" draw:text-style-name="P13" draw:layer="layout" svg:x1="12.439cm" svg:y1="14.038cm" svg:x2="11.234cm" svg:y2="15cm">
          <text:p/>
        </draw:line>
        <draw:frame draw:style-name="gr5" draw:text-style-name="P9" draw:layer="layout" svg:width="1.205cm" svg:height="0.962cm" svg:x="5.995cm" svg:y="15.6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195cm" svg:y="14.8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14.0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14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line draw:style-name="gr8" draw:text-style-name="P13" draw:layer="layout" svg:x1="7cm" svg:y1="14cm" svg:x2="6.2cm" svg:y2="14.962cm">
          <text:p/>
        </draw:line>
        <draw:line draw:style-name="gr8" draw:text-style-name="P13" draw:layer="layout" svg:x1="8.8cm" svg:y1="14.038cm" svg:x2="7.714cm" svg:y2="15cm">
          <text:p/>
        </draw:line>
        <draw:frame draw:style-name="gr5" draw:text-style-name="P9" draw:layer="layout" svg:width="1.205cm" svg:height="0.962cm" svg:x="7.714cm" svg:y="14.8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38cm">
          <draw:text-box>
            <text:p><text:span text:style-name="T5">40</text:span></text:p>
          </draw:text-box>
        </draw:frame>
        <draw:line draw:style-name="gr8" draw:text-style-name="P13" draw:layer="layout" svg:x1="7.2cm" svg:y1="14.838cm" svg:x2="5.995cm" svg:y2="15.8cm">
          <text:p/>
        </draw:line>
        <draw:line draw:style-name="gr8" draw:text-style-name="P13" draw:layer="layout" svg:x1="12.439cm" svg:y1="14.038cm" svg:x2="11.234cm" svg:y2="15cm">
          <text:p/>
        </draw:line>
        <draw:frame draw:style-name="gr5" draw:text-style-name="P9" draw:layer="layout" svg:width="1.205cm" svg:height="0.962cm" svg:x="5.995cm" svg:y="15.6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195cm" svg:y="14.838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8.2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8.2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8.2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8.2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40</text:span></text:p>
          </draw:text-box>
        </draw:frame>
        <draw:line draw:style-name="gr10" draw:text-style-name="P13" draw:layer="layout" svg:x1="8cm" svg:y1="19.4cm" svg:x2="8.8cm" svg:y2="18.238cm">
          <text:p/>
        </draw:line>
        <draw:line draw:style-name="gr10" draw:text-style-name="P13" draw:layer="layout" svg:x1="11.4cm" svg:y1="19.4cm" svg:x2="12.2cm" svg:y2="18.2cm">
          <text:p/>
        </draw:line>
        <draw:frame draw:style-name="gr5" draw:text-style-name="P9" draw:layer="layout" svg:width="1.205cm" svg:height="0.962cm" svg:x="11.195cm" svg:y="19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19.038cm">
          <draw:text-box>
            <text:p><text:span text:style-name="T5">4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3.196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5.6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3.196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5.6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23.196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5.6cm">
          <draw:text-box>
            <text:p><text:span text:style-name="T5">50</text:span></text:p>
          </draw:text-box>
        </draw:frame>
        <draw:line draw:style-name="gr8" draw:text-style-name="P13" draw:layer="layout" svg:x1="24.2cm" svg:y1="5.6cm" svg:x2="23.4cm" svg:y2="6.562cm">
          <text:p/>
        </draw:line>
        <draw:line draw:style-name="gr8" draw:text-style-name="P13" draw:layer="layout" svg:x1="25.6cm" svg:y1="5.6cm" svg:x2="25cm" svg:y2="6.562cm">
          <text:p/>
        </draw:line>
        <draw:frame draw:style-name="gr5" draw:text-style-name="P9" draw:layer="layout" svg:width="1.205cm" svg:height="0.962cm" svg:x="24.8cm" svg:y="6.43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3.2cm" svg:y="6.4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6.43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3.2cm" svg:y="6.4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S</text:span><text:span text:style-name="T1">o</text:span><text:span text:style-name="T1">r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6.43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3.2cm" svg:y="6.4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/text:span><text:span text:style-name="T4"><text:s text:c="4"/></text:span><text:span text:style-name="T4"><text:s text:c="3"/></text:span><text:span text:style-name="T4">1 <text:s/></text:span><text:span text:style-name="T4"><text:s text:c="4"/></text:span><text:span text:style-name="T4"><text:s text:c="3"/></text:span><text:span text:style-name="T4">2 <text:s/></text:span><text:span text:style-name="T4"><text:s text:c="4"/></text:span><text:span text:style-name="T4"><text:s text:c="2"/></text:span><text:span text:style-name="T4">3 <text:s/></text:span><text:span text:style-name="T4"><text:s text:c="4"/></text:span><text:span text:style-name="T4"><text:s text:c="2"/></text:span><text:span text:style-name="T4">4 <text:s/></text:span><text:span text:style-name="T4"><text:s text:c="4"/></text:span><text:span text:style-name="T4"><text:s text:c="2"/></text:span><text:span text:style-name="T4">5 <text:s/></text:span></text:p>
          </draw:text-box>
        </draw:frame>
        <draw:frame draw:style-name="gr5" draw:text-style-name="P9" draw:layer="layout" svg:width="1.205cm" svg:height="0.962cm" svg:x="4.2cm" svg:y="5.6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9.562cm" svg:y="5.6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cm" svg:y="5.6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5.838cm" svg:y="5.6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2.2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7.68cm" svg:y="5.6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9.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11.234cm" svg:y="9.83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.2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6cm" svg:y="9.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7.714cm" svg:y="9.8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4.2cm" svg:y="10.638cm">
          <draw:text-box>
            <text:p><text:span text:style-name="T5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/text:span><text:span text:style-name="T4"><text:s text:c="4"/></text:span><text:span text:style-name="T4"><text:s text:c="3"/></text:span><text:span text:style-name="T4">1 <text:s/></text:span><text:span text:style-name="T4"><text:s text:c="4"/></text:span><text:span text:style-name="T4"><text:s text:c="3"/></text:span><text:span text:style-name="T4">2 <text:s/></text:span><text:span text:style-name="T4"><text:s text:c="4"/></text:span><text:span text:style-name="T4"><text:s text:c="2"/></text:span><text:span text:style-name="T4">3 <text:s/></text:span><text:span text:style-name="T4"><text:s text:c="4"/></text:span><text:span text:style-name="T4"><text:s text:c="2"/></text:span><text:span text:style-name="T4">4 <text:s/></text:span><text:span text:style-name="T4"><text:s text:c="4"/></text:span><text:span text:style-name="T4"><text:s text:c="2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4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4.8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4.8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714cm" svg:y="14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4.8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4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/text:span><text:span text:style-name="T4"><text:s text:c="4"/></text:span><text:span text:style-name="T4"><text:s text:c="3"/></text:span><text:span text:style-name="T4">1 <text:s/></text:span><text:span text:style-name="T4"><text:s text:c="4"/></text:span><text:span text:style-name="T4"><text:s text:c="3"/></text:span><text:span text:style-name="T4">2 <text:s/></text:span><text:span text:style-name="T4"><text:s text:c="4"/></text:span><text:span text:style-name="T4"><text:s text:c="2"/></text:span><text:span text:style-name="T4">3 <text:s/></text:span><text:span text:style-name="T4"><text:s text:c="4"/></text:span><text:span text:style-name="T4"><text:s text:c="2"/></text:span><text:span text:style-name="T4">4 <text:s/></text:span><text:span text:style-name="T4"><text:s text:c="4"/></text:span><text:span text:style-name="T4"><text:s text:c="2"/></text:span><text:span text:style-name="T4">5 <text:s/></text:span></text:p>
          </draw:text-box>
        </draw:frame>
        <draw:frame draw:style-name="gr5" draw:text-style-name="P9" draw:layer="layout" svg:width="1.205cm" svg:height="0.962cm" svg:x="9.596cm" svg:y="18.2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.234cm" svg:y="19.0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4.2cm" svg:y="19.0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7.8cm" svg:y="19.038cm">
          <draw:text-box>
            <text:p><text:span text:style-name="T5">50</text:span></text:p>
          </draw:text-box>
        </draw:frame>
        <draw:frame draw:style-name="gr5" draw:text-style-name="P9" draw:layer="layout" svg:width="1.205cm" svg:height="0.962cm" svg:x="5.995cm" svg:y="19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11.2cm" svg:y="18.2cm">
          <draw:text-box>
            <text:p><text:span text:style-name="T5">4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/text:span><text:span text:style-name="T4"><text:s text:c="4"/></text:span><text:span text:style-name="T4"><text:s text:c="3"/></text:span><text:span text:style-name="T4">1 <text:s/></text:span><text:span text:style-name="T4"><text:s text:c="4"/></text:span><text:span text:style-name="T4"><text:s text:c="3"/></text:span><text:span text:style-name="T4">2 <text:s/></text:span><text:span text:style-name="T4"><text:s text:c="4"/></text:span><text:span text:style-name="T4"><text:s text:c="2"/></text:span><text:span text:style-name="T4">3 <text:s/></text:span><text:span text:style-name="T4"><text:s text:c="4"/></text:span><text:span text:style-name="T4"><text:s text:c="2"/></text:span><text:span text:style-name="T4">4 <text:s/></text:span><text:span text:style-name="T4"><text:s text:c="4"/></text:span><text:span text:style-name="T4"><text:s text:c="2"/></text:span><text:span text:style-name="T4">5 <text:s/></text:span></text:p>
          </draw:text-box>
        </draw:frame>
        <draw:frame draw:style-name="gr5" draw:text-style-name="P9" draw:layer="layout" svg:width="1.205cm" svg:height="0.962cm" svg:x="15.834cm" svg:y="6.4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6.4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6.4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6.4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6.43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3.2cm" svg:y="6.4cm">
          <draw:text-box>
            <text:p><text:span text:style-name="T5">50</text:span></text:p>
          </draw:text-box>
        </draw:frame>
        <draw:custom-shape draw:style-name="gr6" draw:text-style-name="P11" draw:layer="layout" svg:width="1.8cm" svg:height="2.6cm" svg:x="15.6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4.6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8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9" draw:layer="layout" svg:width="1.205cm" svg:height="0.962cm" svg:x="15.834cm" svg:y="10.638cm">
          <draw:text-box>
            <text:p><text:span text:style-name="T5">10</text:span></text:p>
          </draw:text-box>
        </draw:frame>
        <draw:frame draw:style-name="gr5" draw:text-style-name="P9" draw:layer="layout" svg:width="1.205cm" svg:height="0.962cm" svg:x="17.8cm" svg:y="10.638cm">
          <draw:text-box>
            <text:p><text:span text:style-name="T5">20</text:span></text:p>
          </draw:text-box>
        </draw:frame>
        <draw:frame draw:style-name="gr5" draw:text-style-name="P9" draw:layer="layout" svg:width="1.205cm" svg:height="0.962cm" svg:x="21.4cm" svg:y="10.638cm">
          <draw:text-box>
            <text:p><text:span text:style-name="T5">40</text:span></text:p>
          </draw:text-box>
        </draw:frame>
        <draw:frame draw:style-name="gr5" draw:text-style-name="P9" draw:layer="layout" svg:width="1.205cm" svg:height="0.962cm" svg:x="19.595cm" svg:y="10.6cm">
          <draw:text-box>
            <text:p><text:span text:style-name="T5">30</text:span></text:p>
          </draw:text-box>
        </draw:frame>
        <draw:frame draw:style-name="gr5" draw:text-style-name="P9" draw:layer="layout" svg:width="1.205cm" svg:height="0.962cm" svg:x="24.8cm" svg:y="10.638cm">
          <draw:text-box>
            <text:p><text:span text:style-name="T5">60</text:span></text:p>
          </draw:text-box>
        </draw:frame>
        <draw:frame draw:style-name="gr5" draw:text-style-name="P9" draw:layer="layout" svg:width="1.205cm" svg:height="0.962cm" svg:x="23.2cm" svg:y="10.6cm">
          <draw:text-box>
            <text:p><text:span text:style-name="T5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Sel</text:span><text:span text:style-name="T6">ecti</text:span><text:span text:style-name="T6">on </text:span><text:span text:style-name="T6">Sor</text:span><text:span text:style-name="T6">t</text:span></text:p>
          </draw:text-box>
        </draw:frame>
        <draw:custom-shape draw:style-name="gr6" draw:text-style-name="P11" draw:layer="layout" svg:width="1.8cm" svg:height="2.6cm" svg:x="1.9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3.7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5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3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16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0.96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32cm" svg:y="4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4.2cm" svg:y="5.6cm">
          <draw:text-box>
            <text:p><text:span text:style-name="T7">50</text:span></text:p>
          </draw:text-box>
        </draw:frame>
        <draw:frame draw:style-name="gr5" draw:text-style-name="P14" draw:layer="layout" svg:width="1.205cm" svg:height="0.962cm" svg:x="9.562cm" svg:y="5.6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11.2cm" svg:y="5.638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5.838cm" svg:y="5.6cm">
          <draw:text-box>
            <text:p><text:span text:style-name="T7">40</text:span></text:p>
          </draw:text-box>
        </draw:frame>
        <draw:frame draw:style-name="gr5" draw:text-style-name="P14" draw:layer="layout" svg:width="1.205cm" svg:height="0.962cm" svg:x="2.2cm" svg:y="6.4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7.68cm" svg:y="5.6cm">
          <draw:text-box>
            <text:p><text:span text:style-name="T7">20</text:span></text:p>
          </draw:text-box>
        </draw:frame>
        <draw:custom-shape draw:style-name="gr6" draw:text-style-name="P11" draw:layer="layout" svg:width="1.8cm" svg:height="2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8.8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9.596cm" svg:y="9.8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11.234cm" svg:y="9.838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2.234cm" svg:y="10.6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6cm" svg:y="9.8cm">
          <draw:text-box>
            <text:p><text:span text:style-name="T7">50</text:span></text:p>
          </draw:text-box>
        </draw:frame>
        <draw:frame draw:style-name="gr5" draw:text-style-name="P14" draw:layer="layout" svg:width="1.205cm" svg:height="0.962cm" svg:x="7.714cm" svg:y="9.838cm">
          <draw:text-box>
            <text:p><text:span text:style-name="T7">40</text:span></text:p>
          </draw:text-box>
        </draw:frame>
        <draw:frame draw:style-name="gr5" draw:text-style-name="P14" draw:layer="layout" svg:width="1.205cm" svg:height="0.962cm" svg:x="4.2cm" svg:y="10.638cm">
          <draw:text-box>
            <text:p><text:span text:style-name="T7">20</text:span></text:p>
          </draw:text-box>
        </draw:frame>
        <draw:custom-shape draw:style-name="gr6" draw:text-style-name="P11" draw:layer="layout" svg:width="1.8cm" svg:height="2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7.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3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9.596cm" svg:y="14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2.234cm" svg:y="14.8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4.2cm" svg:y="14.838cm">
          <draw:text-box>
            <text:p><text:span text:style-name="T7">20</text:span></text:p>
          </draw:text-box>
        </draw:frame>
        <draw:frame draw:style-name="gr5" draw:text-style-name="P14" draw:layer="layout" svg:width="1.205cm" svg:height="0.962cm" svg:x="7.714cm" svg:y="14.038cm">
          <draw:text-box>
            <text:p><text:span text:style-name="T7">50</text:span></text:p>
          </draw:text-box>
        </draw:frame>
        <draw:frame draw:style-name="gr5" draw:text-style-name="P14" draw:layer="layout" svg:width="1.205cm" svg:height="0.962cm" svg:x="5.995cm" svg:y="14.8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11.2cm" svg:y="14cm">
          <draw:text-box>
            <text:p><text:span text:style-name="T7">40</text:span></text:p>
          </draw:text-box>
        </draw:frame>
        <draw:custom-shape draw:style-name="gr6" draw:text-style-name="P11" draw:layer="layout" svg:width="1.8cm" svg:height="2.6cm" svg:x="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7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11cm" svg:y="18.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2.366cm" svg:y="17.2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9.596cm" svg:y="18.2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2.234cm" svg:y="19.0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4.2cm" svg:y="19.038cm">
          <draw:text-box>
            <text:p><text:span text:style-name="T7">20</text:span></text:p>
          </draw:text-box>
        </draw:frame>
        <draw:frame draw:style-name="gr5" draw:text-style-name="P14" draw:layer="layout" svg:width="1.205cm" svg:height="0.962cm" svg:x="7.8cm" svg:y="19.038cm">
          <draw:text-box>
            <text:p><text:span text:style-name="T7">50</text:span></text:p>
          </draw:text-box>
        </draw:frame>
        <draw:frame draw:style-name="gr5" draw:text-style-name="P14" draw:layer="layout" svg:width="1.205cm" svg:height="0.962cm" svg:x="5.995cm" svg:y="19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11.2cm" svg:y="18.2cm">
          <draw:text-box>
            <text:p><text:span text:style-name="T7">40</text:span></text:p>
          </draw:text-box>
        </draw:frame>
        <draw:custom-shape draw:style-name="gr6" draw:text-style-name="P11" draw:layer="layout" svg:width="1.8cm" svg:height="2.6cm" svg:x="15.6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7.4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8cm" svg:height="2.6cm" svg:x="22.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8cm" svg:height="2.6cm" svg:x="24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4.4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15.834cm" svg:y="6.4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17.8cm" svg:y="6.438cm">
          <draw:text-box>
            <text:p><text:span text:style-name="T7">20</text:span></text:p>
          </draw:text-box>
        </draw:frame>
        <draw:frame draw:style-name="gr5" draw:text-style-name="P14" draw:layer="layout" svg:width="1.205cm" svg:height="0.962cm" svg:x="21.4cm" svg:y="6.438cm">
          <draw:text-box>
            <text:p><text:span text:style-name="T7">40</text:span></text:p>
          </draw:text-box>
        </draw:frame>
        <draw:frame draw:style-name="gr5" draw:text-style-name="P14" draw:layer="layout" svg:width="1.205cm" svg:height="0.962cm" svg:x="19.595cm" svg:y="6.4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24.8cm" svg:y="6.438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23.2cm" svg:y="6.4cm">
          <draw:text-box>
            <text:p><text:span text:style-name="T7">50</text:span></text:p>
          </draw:text-box>
        </draw:frame>
        <draw:custom-shape draw:style-name="gr11" draw:text-style-name="P15" draw:layer="layout" svg:width="1.8cm" svg:height="2.6cm" svg:x="15.6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8cm" svg:height="2.6cm" svg:x="17.4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8cm" svg:height="2.6cm" svg:x="19.2cm" svg:y="9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.8cm" svg:height="2.6cm" svg:x="21cm" svg:y="9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.8cm" svg:height="2.6cm" svg:x="22.8cm" svg:y="9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8cm" svg:height="2.6cm" svg:x="24.6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434cm" svg:height="0.962cm" svg:x="15.966cm" svg:y="8.6cm">
          <draw:text-box>
            <text:p><text:span text:style-name="T4"><text:s/></text:span><text:span text:style-name="T4">0 <text:s text:c="4"/></text:span><text:span text:style-name="T4"><text:s text:c="3"/>1 <text:s text:c="2"/></text:span><text:span text:style-name="T4"><text:s text:c="6"/></text:span><text:span text:style-name="T4">2 <text:s text:c="5"/></text:span><text:span text:style-name="T4"><text:s text:c="2"/>3 <text:s text:c="3"/></text:span><text:span text:style-name="T4"><text:s text:c="4"/>4 <text:s/></text:span><text:span text:style-name="T4"><text:s text:c="6"/></text:span><text:span text:style-name="T4">5 <text:s/></text:span></text:p>
          </draw:text-box>
        </draw:frame>
        <draw:frame draw:style-name="gr5" draw:text-style-name="P14" draw:layer="layout" svg:width="1.205cm" svg:height="0.962cm" svg:x="15.834cm" svg:y="10.638cm">
          <draw:text-box>
            <text:p><text:span text:style-name="T7">10</text:span></text:p>
          </draw:text-box>
        </draw:frame>
        <draw:frame draw:style-name="gr5" draw:text-style-name="P14" draw:layer="layout" svg:width="1.205cm" svg:height="0.962cm" svg:x="17.8cm" svg:y="10.638cm">
          <draw:text-box>
            <text:p><text:span text:style-name="T7">20</text:span></text:p>
          </draw:text-box>
        </draw:frame>
        <draw:frame draw:style-name="gr5" draw:text-style-name="P14" draw:layer="layout" svg:width="1.205cm" svg:height="0.962cm" svg:x="21.4cm" svg:y="10.638cm">
          <draw:text-box>
            <text:p><text:span text:style-name="T7">40</text:span></text:p>
          </draw:text-box>
        </draw:frame>
        <draw:frame draw:style-name="gr5" draw:text-style-name="P14" draw:layer="layout" svg:width="1.205cm" svg:height="0.962cm" svg:x="19.595cm" svg:y="10.6cm">
          <draw:text-box>
            <text:p><text:span text:style-name="T7">30</text:span></text:p>
          </draw:text-box>
        </draw:frame>
        <draw:frame draw:style-name="gr5" draw:text-style-name="P14" draw:layer="layout" svg:width="1.205cm" svg:height="0.962cm" svg:x="24.8cm" svg:y="10.638cm">
          <draw:text-box>
            <text:p><text:span text:style-name="T7">60</text:span></text:p>
          </draw:text-box>
        </draw:frame>
        <draw:frame draw:style-name="gr5" draw:text-style-name="P14" draw:layer="layout" svg:width="1.205cm" svg:height="0.962cm" svg:x="23.2cm" svg:y="10.6cm">
          <draw:text-box>
            <text:p><text:span text:style-name="T7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7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79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1:48:52.879786929</meta:creation-date>
    <meta:editing-duration>PT1H23M35S</meta:editing-duration>
    <meta:editing-cycles>20</meta:editing-cycles>
    <meta:generator>LibreOffice/6.0.7.3$Linux_X86_64 LibreOffice_project/00m0$Build-3</meta:generator>
    <dc:title>Impress</dc:title>
    <dc:date>2023-04-05T11:24:28.762630920</dc:date>
    <meta:document-statistic meta:object-count="1651"/>
  </office:meta>
</office:document-meta>
</file>